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Mono_1.ttf" manifest:media-type="application/x-font-ttf"/>
  <manifest:file-entry manifest:full-path="Fonts/Font_WenQuanYi_Micro_Hei_1.ttf" manifest:media-type="application/x-font-ttf"/>
  <manifest:file-entry manifest:full-path="Fonts/Font_FreeSans_1.ttf" manifest:media-type="application/x-font-ttf"/>
  <manifest:file-entry manifest:full-path="Pictures/1000000100000449000000CB195DA01E.png" manifest:media-type="image/png"/>
  <manifest:file-entry manifest:full-path="Pictures/10000001000001C7000000BB4A27BC1A.png" manifest:media-type="image/png"/>
  <manifest:file-entry manifest:full-path="Pictures/10000001000002E3000001A2D8FA9B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Table1" style:family="table">
      <style:table-properties style:width="4.5in" table:align="center"/>
    </style:style>
    <style:style style:name="Table1.A" style:family="table-column">
      <style:table-column-properties style:column-width="1.4403in"/>
    </style:style>
    <style:style style:name="Table1.B" style:family="table-column">
      <style:table-column-properties style:column-width="3.0597in"/>
    </style:style>
    <style:style style:name="Table1.A1" style:family="table-cell">
      <style:table-cell-properties style:vertical-align="middle" fo:padding="0.0201in" fo:border-left="0.5pt solid #000000" fo:border-right="none" fo:border-top="0.5pt solid #000000" fo:border-bottom="0.5pt solid #000000"/>
    </style:style>
    <style:style style:name="Table1.B1" style:family="table-cell">
      <style:table-cell-properties style:vertical-align="middle" fo:padding="0.0201in" fo:border="0.5pt solid #000000"/>
    </style:style>
    <style:style style:name="Table1.A2" style:family="table-cell">
      <style:table-cell-properties style:vertical-align="middle" fo:padding="0.0201in" fo:border-left="0.5pt solid #000000" fo:border-right="none" fo:border-top="none" fo:border-bottom="0.5pt solid #000000"/>
    </style:style>
    <style:style style:name="Table1.B2" style:family="table-cell">
      <style:table-cell-properties style:vertical-align="middle" fo:padding="0.0201in" fo:border-left="0.5pt solid #000000" fo:border-right="0.5pt solid #000000" fo:border-top="none" fo:border-bottom="0.5pt solid #000000"/>
    </style:style>
    <style:style style:name="P1" style:family="paragraph" style:parent-style-name="Standard">
      <style:text-properties officeooo:rsid="001ad482" officeooo:paragraph-rsid="001ad482"/>
    </style:style>
    <style:style style:name="P2" style:family="paragraph" style:parent-style-name="Heading_20_2">
      <style:paragraph-properties fo:margin-top="0in" fo:margin-bottom="0in" style:contextual-spacing="false"/>
    </style:style>
    <style:style style:name="P3" style:family="paragraph" style:parent-style-name="Standard">
      <style:text-properties fo:font-size="6pt" officeooo:rsid="001ad482" officeooo:paragraph-rsid="001ad482" style:font-size-asian="5.25pt" style:font-size-complex="6pt"/>
    </style:style>
    <style:style style:name="P4" style:family="paragraph" style:parent-style-name="Standard">
      <style:text-properties officeooo:rsid="001ad482" officeooo:paragraph-rsid="001f2b92"/>
    </style:style>
    <style:style style:name="P5" style:family="paragraph" style:parent-style-name="Standard">
      <style:text-properties fo:font-size="6pt" officeooo:rsid="001ad482" officeooo:paragraph-rsid="001f2b92" style:font-size-asian="5.25pt" style:font-size-complex="6pt"/>
    </style:style>
    <style:style style:name="P6" style:family="paragraph" style:parent-style-name="Standard">
      <style:paragraph-properties fo:text-align="center" style:justify-single-word="false"/>
      <style:text-properties fo:font-weight="bold" officeooo:rsid="001ad482" officeooo:paragraph-rsid="001ad482" style:font-weight-asian="bold" style:font-weight-complex="bold"/>
    </style:style>
    <style:style style:name="P7" style:family="paragraph" style:parent-style-name="Standard">
      <style:text-properties officeooo:rsid="001ad482" officeooo:paragraph-rsid="0024a92c"/>
    </style:style>
    <style:style style:name="P8" style:family="paragraph" style:parent-style-name="Standard">
      <style:text-properties fo:font-size="6pt" officeooo:rsid="001ad482" officeooo:paragraph-rsid="0024a92c" style:font-size-asian="5.25pt" style:font-size-complex="6pt"/>
    </style:style>
    <style:style style:name="P9" style:family="paragraph" style:parent-style-name="Heading_20_2">
      <style:paragraph-properties fo:margin-top="0.1402in" fo:margin-bottom="0in" style:contextual-spacing="false"/>
    </style:style>
    <style:style style:name="P10" style:family="paragraph" style:parent-style-name="Standard">
      <style:text-properties officeooo:rsid="001b9aac" officeooo:paragraph-rsid="001b9aac"/>
    </style:style>
    <style:style style:name="P11" style:family="paragraph" style:parent-style-name="Standard" style:list-style-name="L1">
      <style:text-properties officeooo:paragraph-rsid="001b9aac"/>
    </style:style>
    <style:style style:name="P12" style:family="paragraph" style:parent-style-name="Standard">
      <style:text-properties fo:font-size="6pt" officeooo:rsid="001b9aac" officeooo:paragraph-rsid="001b9aac" style:font-size-asian="5.25pt" style:font-size-complex="6pt"/>
    </style:style>
    <style:style style:name="P13" style:family="paragraph" style:parent-style-name="Standard">
      <style:paragraph-properties fo:text-align="center" style:justify-single-word="false"/>
      <style:text-properties style:font-name="Noto Mono" fo:font-size="10pt" officeooo:rsid="001d4908" officeooo:paragraph-rsid="001d4908" style:font-size-asian="10pt" style:font-size-complex="10pt"/>
    </style:style>
    <style:style style:name="P14" style:family="paragraph" style:parent-style-name="Standard" style:list-style-name="L2">
      <style:text-properties officeooo:paragraph-rsid="0022b552"/>
    </style:style>
    <style:style style:name="P15" style:family="paragraph" style:parent-style-name="Standard">
      <style:paragraph-properties fo:text-align="left" style:justify-single-word="false"/>
      <style:text-properties fo:font-size="6pt" officeooo:rsid="001d4908" officeooo:paragraph-rsid="001d4908" style:font-size-asian="5.25pt" style:font-size-complex="6pt"/>
    </style:style>
    <style:style style:name="P16" style:family="paragraph" style:parent-style-name="Standard" style:list-style-name="L3">
      <style:paragraph-properties fo:text-align="left" style:justify-single-word="false"/>
      <style:text-properties officeooo:paragraph-rsid="0022b552"/>
    </style:style>
    <style:style style:name="P17" style:family="paragraph" style:parent-style-name="Standard">
      <style:text-properties fo:font-size="6pt" officeooo:rsid="001ad482" officeooo:paragraph-rsid="001d4908" style:font-size-asian="5.25pt" style:font-size-complex="6pt"/>
    </style:style>
    <style:style style:name="P18" style:family="paragraph" style:parent-style-name="Standard" style:list-style-name="L4">
      <style:paragraph-properties fo:text-align="left" style:justify-single-word="false"/>
      <style:text-properties officeooo:paragraph-rsid="0035d3a0"/>
    </style:style>
    <style:style style:name="P19" style:family="paragraph" style:parent-style-name="Standard">
      <style:paragraph-properties fo:margin-left="0.4925in" fo:text-align="left" style:justify-single-word="false" fo:text-indent="0in" style:auto-text-indent="false"/>
      <style:text-properties officeooo:rsid="0022b552" officeooo:paragraph-rsid="0035d3a0"/>
    </style:style>
    <style:style style:name="P20" style:family="paragraph" style:parent-style-name="Standard">
      <style:paragraph-properties fo:text-align="left" style:justify-single-word="false"/>
      <style:text-properties fo:font-size="6pt" officeooo:paragraph-rsid="001d4908" style:font-size-asian="5.25pt" style:font-size-complex="6pt"/>
    </style:style>
    <style:style style:name="P21" style:family="paragraph" style:parent-style-name="Standard">
      <style:paragraph-properties fo:text-align="left" style:justify-single-word="false"/>
      <style:text-properties fo:font-size="6pt" officeooo:rsid="0020e427" officeooo:paragraph-rsid="0020e427" style:font-size-asian="5.25pt" style:font-size-complex="6pt"/>
    </style:style>
    <style:style style:name="P22" style:family="paragraph" style:parent-style-name="Standard">
      <style:paragraph-properties fo:text-align="left" style:justify-single-word="false"/>
      <style:text-properties officeooo:paragraph-rsid="0020e427"/>
    </style:style>
    <style:style style:name="P23" style:family="paragraph" style:parent-style-name="Heading_20_3">
      <style:paragraph-properties fo:break-before="page"/>
    </style:style>
    <style:style style:name="P24" style:family="paragraph" style:parent-style-name="Standard">
      <style:text-properties fo:font-size="6pt" style:font-size-asian="5.25pt" style:font-size-complex="6pt"/>
    </style:style>
    <style:style style:name="P25" style:family="paragraph" style:parent-style-name="Standard">
      <style:text-properties officeooo:rsid="0020e427" officeooo:paragraph-rsid="0031aa04"/>
    </style:style>
    <style:style style:name="P26" style:family="paragraph" style:parent-style-name="Standard">
      <style:text-properties fo:font-size="10pt" officeooo:rsid="0020e427" officeooo:paragraph-rsid="0020e427" style:font-size-asian="8.75pt" style:font-size-complex="10pt"/>
    </style:style>
    <style:style style:name="P27" style:family="paragraph" style:parent-style-name="Standard">
      <style:paragraph-properties fo:text-align="center" style:justify-single-word="false"/>
      <style:text-properties style:font-name="Noto Mono" fo:font-size="10pt" officeooo:rsid="0020e427" officeooo:paragraph-rsid="0020e427" style:font-size-asian="10pt" style:font-size-complex="10pt"/>
    </style:style>
    <style:style style:name="P28" style:family="paragraph" style:parent-style-name="Standard">
      <style:text-properties officeooo:paragraph-rsid="0031aa04"/>
    </style:style>
    <style:style style:name="P29" style:family="paragraph" style:parent-style-name="Text_20_body">
      <style:paragraph-properties fo:margin-top="0in" fo:margin-bottom="0in" style:contextual-spacing="false"/>
      <style:text-properties fo:font-size="10pt" officeooo:rsid="0022b552" officeooo:paragraph-rsid="0022b552" style:font-size-asian="8.75pt" style:font-size-complex="10pt"/>
    </style:style>
    <style:style style:name="P30" style:family="paragraph" style:parent-style-name="Text_20_body">
      <style:paragraph-properties fo:margin-top="0in" fo:margin-bottom="0in" style:contextual-spacing="false"/>
      <style:text-properties officeooo:rsid="0022b552" officeooo:paragraph-rsid="0022b552"/>
    </style:style>
    <style:style style:name="P31" style:family="paragraph" style:parent-style-name="Text_20_body">
      <style:paragraph-properties fo:margin-top="0in" fo:margin-bottom="0in" style:contextual-spacing="false"/>
      <style:text-properties officeooo:rsid="0024a92c" officeooo:paragraph-rsid="0024a92c"/>
    </style:style>
    <style:style style:name="P32" style:family="paragraph" style:parent-style-name="Text_20_body">
      <style:paragraph-properties fo:margin-top="0in" fo:margin-bottom="0in" style:contextual-spacing="false"/>
    </style:style>
    <style:style style:name="P33" style:family="paragraph" style:parent-style-name="Heading_20_3">
      <style:paragraph-properties fo:margin-top="0in" fo:margin-bottom="0.0799in" style:contextual-spacing="false"/>
    </style:style>
    <style:style style:name="P34" style:family="paragraph" style:parent-style-name="Text_20_body">
      <style:paragraph-properties fo:margin-top="0in" fo:margin-bottom="0.0402in" style:contextual-spacing="false"/>
      <style:text-properties officeooo:rsid="002109dd" officeooo:paragraph-rsid="002109dd"/>
    </style:style>
    <style:style style:name="P35" style:family="paragraph" style:parent-style-name="Text_20_body">
      <style:paragraph-properties fo:text-align="center" style:justify-single-word="false"/>
      <style:text-properties style:font-name="Noto Mono" fo:font-size="10pt" officeooo:rsid="002109dd" officeooo:paragraph-rsid="002109dd" style:font-size-asian="10pt" style:font-size-complex="10pt"/>
    </style:style>
    <style:style style:name="P36" style:family="paragraph" style:parent-style-name="Text_20_body">
      <style:paragraph-properties fo:margin-top="0in" fo:margin-bottom="0in" style:contextual-spacing="false"/>
      <style:text-properties officeooo:rsid="002109dd" officeooo:paragraph-rsid="002109dd"/>
    </style:style>
    <style:style style:name="P37" style:family="paragraph" style:parent-style-name="Standard">
      <style:text-properties officeooo:rsid="003464c2" officeooo:paragraph-rsid="003464c2"/>
    </style:style>
    <style:style style:name="P38" style:family="paragraph" style:parent-style-name="Text_20_body">
      <style:text-properties fo:font-size="12pt" style:font-size-asian="10.5pt" style:font-size-complex="12pt"/>
    </style:style>
    <style:style style:name="P39" style:family="paragraph" style:parent-style-name="Text_20_body">
      <style:text-properties fo:font-size="12pt" officeooo:rsid="003a222d" officeooo:paragraph-rsid="003a222d" style:font-size-asian="10.5pt" style:font-size-complex="12pt"/>
    </style:style>
    <style:style style:name="P40" style:family="paragraph" style:parent-style-name="Table_20_Contents">
      <style:paragraph-properties fo:margin-top="0in" fo:margin-bottom="0.1965in" style:contextual-spacing="false" fo:text-align="left" style:justify-single-word="false"/>
    </style:style>
    <style:style style:name="P41" style:family="paragraph" style:parent-style-name="Standard">
      <style:text-properties officeooo:rsid="001ad482" officeooo:paragraph-rsid="00346d30"/>
    </style:style>
    <style:style style:name="P42" style:family="paragraph" style:parent-style-name="Standard">
      <style:text-properties fo:font-size="12pt" officeooo:rsid="001ad482" officeooo:paragraph-rsid="00346d30" style:font-size-asian="10.5pt" style:font-size-complex="12pt"/>
    </style:style>
    <style:style style:name="P43" style:family="paragraph" style:parent-style-name="Text_20_body">
      <style:paragraph-properties fo:margin-left="0in" fo:text-align="center" style:justify-single-word="false" fo:text-indent="0in" style:auto-text-indent="false"/>
    </style:style>
    <style:style style:name="P44" style:family="paragraph" style:parent-style-name="Standard">
      <style:text-properties fo:font-size="6pt" officeooo:rsid="0031aa04" officeooo:paragraph-rsid="0031aa04" style:font-size-asian="5.25pt" style:font-size-complex="6pt"/>
    </style:style>
    <style:style style:name="P45" style:family="paragraph" style:parent-style-name="Standard">
      <style:text-properties officeooo:paragraph-rsid="0022b552"/>
    </style:style>
    <style:style style:name="P46" style:family="paragraph" style:parent-style-name="Standard">
      <style:text-properties officeooo:rsid="0017c327" officeooo:paragraph-rsid="0022b552"/>
    </style:style>
    <style:style style:name="P47" style:family="paragraph" style:parent-style-name="Standard">
      <style:text-properties fo:font-size="12pt" officeooo:rsid="0017c327" officeooo:paragraph-rsid="0022b552" style:font-size-asian="10.5pt" style:font-size-complex="12pt"/>
    </style:style>
    <style:style style:name="P48" style:family="paragraph" style:parent-style-name="Text_20_body">
      <style:paragraph-properties fo:margin-top="0in" fo:margin-bottom="0.0598in" style:contextual-spacing="false" fo:line-height="115%" fo:text-align="left" style:justify-single-word="false" style:writing-mode="lr-tb"/>
      <style:text-properties officeooo:paragraph-rsid="0022b552"/>
    </style:style>
    <style:style style:name="P49" style:family="paragraph" style:parent-style-name="Standard">
      <style:paragraph-properties fo:text-align="justify" style:justify-single-word="false"/>
      <style:text-properties officeooo:rsid="0013a858" officeooo:paragraph-rsid="0022b552"/>
    </style:style>
    <style:style style:name="T1" style:family="text">
      <style:text-properties officeooo:rsid="0035d3a0"/>
    </style:style>
    <style:style style:name="T2" style:family="text">
      <style:text-properties officeooo:rsid="001f2b92"/>
    </style:style>
    <style:style style:name="T3" style:family="text">
      <style:text-properties officeooo:rsid="00209c4e"/>
    </style:style>
    <style:style style:name="T4" style:family="text">
      <style:text-properties officeooo:rsid="0027026d"/>
    </style:style>
    <style:style style:name="T5" style:family="text">
      <style:text-properties officeooo:rsid="0033a197"/>
    </style:style>
    <style:style style:name="T6" style:family="text">
      <style:text-properties officeooo:rsid="00283575"/>
    </style:style>
    <style:style style:name="T7" style:family="text">
      <style:text-properties officeooo:rsid="00346d30"/>
    </style:style>
    <style:style style:name="T8" style:family="text">
      <style:text-properties officeooo:rsid="0020222c"/>
    </style:style>
    <style:style style:name="T9" style:family="text">
      <style:text-properties fo:font-weight="bold" style:font-weight-asian="bold" style:font-weight-complex="bold"/>
    </style:style>
    <style:style style:name="T10" style:family="text">
      <style:text-properties officeooo:rsid="0024a92c"/>
    </style:style>
    <style:style style:name="T11" style:family="text">
      <style:text-properties officeooo:rsid="001b9aac"/>
    </style:style>
    <style:style style:name="T12" style:family="text">
      <style:text-properties officeooo:rsid="001d4908"/>
    </style:style>
    <style:style style:name="T13" style:family="text">
      <style:text-properties officeooo:rsid="002f2faf"/>
    </style:style>
    <style:style style:name="T14" style:family="text">
      <style:text-properties officeooo:rsid="0022b552"/>
    </style:style>
    <style:style style:name="T15" style:family="text">
      <style:text-properties officeooo:rsid="0020e427"/>
    </style:style>
    <style:style style:name="T16" style:family="text">
      <style:text-properties officeooo:rsid="0031aa04"/>
    </style:style>
    <style:style style:name="T17" style:family="text">
      <style:text-properties style:font-name="Noto Mono" fo:font-size="10pt" officeooo:rsid="0022b552" style:font-size-asian="10pt" style:font-size-complex="10pt"/>
    </style:style>
    <style:style style:name="T18" style:family="text">
      <style:text-properties style:font-name="Noto Mono" fo:font-size="10pt" officeooo:rsid="00346d30" style:font-size-asian="10pt" style:font-size-complex="10pt"/>
    </style:style>
    <style:style style:name="T19" style:family="text">
      <style:text-properties style:font-name="Noto Mono" fo:font-size="10pt" officeooo:rsid="0024a92c" style:font-size-asian="10pt" style:font-size-complex="10pt"/>
    </style:style>
    <style:style style:name="T20" style:family="text">
      <style:text-properties officeooo:rsid="002d8f42"/>
    </style:style>
    <style:style style:name="T21" style:family="text">
      <style:text-properties style:text-underline-style="solid" style:text-underline-width="auto" style:text-underline-color="font-color"/>
    </style:style>
    <style:style style:name="T22" style:family="text">
      <style:text-properties officeooo:rsid="00258f5d"/>
    </style:style>
    <style:style style:name="T23" style:family="text">
      <style:text-properties style:text-underline-style="solid" style:text-underline-width="auto" style:text-underline-color="font-color" officeooo:rsid="0024a92c"/>
    </style:style>
    <style:style style:name="T24" style:family="text">
      <style:text-properties fo:font-style="italic" style:font-style-asian="italic" style:font-style-complex="italic"/>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size-asian="12pt" style:font-size-complex="12pt"/>
    </style:style>
    <style:style style:name="T27" style:family="text">
      <style:text-properties officeooo:rsid="002f387f"/>
    </style:style>
    <style:style style:name="T28" style:family="text">
      <style:text-properties officeooo:rsid="0051d112"/>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023 Certificates: Install <text:span text:style-name="T1">How-To</text:span></text:p>
      <text:p text:style-name="P1"/>
      <text:h text:style-name="P2" text:outline-level="2">Introduction</text:h>
      <text:p text:style-name="P3"/>
      <text:p text:style-name="P4">Later this month (June 2026) the Security Certificates issued <text:span text:style-name="T2">by Microsoft</text:span> in 2011 will expire. <text:span text:style-name="T2">These </text:span><text:span text:style-name="T3">certificates </text:span><text:span text:style-name="T2">are </text:span><text:span text:style-name="T3">store</text:span><text:span text:style-name="T4">d</text:span><text:span text:style-name="T3"> in </text:span><text:span text:style-name="T5">UEFI </text:span><text:span text:style-name="T3">firmware </text:span><text:span text:style-name="T2">on all PCs that ha</text:span><text:span text:style-name="T6">d</text:span><text:span text:style-name="T2"> once ran Windows 8 or newer.</text:span></text:p>
      <text:p text:style-name="P5"/>
      <text:p text:style-name="P4">In 2023 Microsoft released an updated file <text:span text:style-name="T2">(shimx64.efi) </text:span>that is used to perform the <text:span text:style-name="T7">first</text:span> part of Secure Boot verification <text:span text:style-name="T2">on Linux </text:span><text:span text:style-name="T7">PC</text:span><text:span text:style-name="T2">s with Secure Boot in an enabled state</text:span>.</text:p>
      <text:p text:style-name="P1"/>
      <text:p text:style-name="P6">Almost all of the existing Operating Systems that used the<text:span text:style-name="T8">se</text:span> 2011 Certificate will still boot.<text:note text:id="ftn1" text:note-class="footnote"><text:note-citation>1</text:note-citation><text:note-body><text:p text:style-name="Footnote"><text:span text:style-name="T9">When Secure Boot certificates expire on Windows devices</text:span> - <text:a xlink:type="simple" xlink:href="https://support.microsoft.com/en-us/topic/when-secure-boot-certificates-expire-on-windows-devices-c83b6afd-a2b6-43c6-938e-57046c80c1c2" text:style-name="Internet_20_link" text:visited-style-name="Visited_20_Internet_20_Link">https://support.microsoft.com/en-us/topic/when-secure-boot-certificates-expire-on-windows-devices-c83b6afd-a2b6-43c6-938e-57046c80c1c2</text:a></text:p></text:note-body></text:note></text:p>
      <text:p text:style-name="P1"/>
      <text:p text:style-name="P7">The reason is the subtlety of the differences in definitions of ‘Expired’ versus ‘Revoked’ words. Microsoft has stated that at some <text:span text:style-name="T7">undefined </text:span>point in the future the<text:span text:style-name="T7">y</text:span> will Revoke the 2011 <text:span text:style-name="T7">c</text:span>erts.</text:p>
      <text:p text:style-name="P8"/>
      <text:p text:style-name="P1">This expiration does NOT have any effect on <text:span text:style-name="T7">Linux</text:span> <text:span text:style-name="T7">d</text:span>rivers or <text:span text:style-name="T7">l</text:span>ibraries <text:span text:style-name="T10">signed by your </text:span>PC <text:span text:style-name="T7">(by Debian’s public certificate) </text:span>or <text:span text:style-name="T10">internal or external </text:span>Hardware Manufacturer’s existing Security Certificates. The<text:span text:style-name="T10">ir certificates</text:span> do <text:span text:style-name="T10">NOT</text:span> depend on the Microsoft certificates to achieve CA Root authenticity <text:span text:style-name="T10">in any way</text:span>.</text:p>
      <text:p text:style-name="P1"/>
      <text:h text:style-name="P9" text:outline-level="2">Installing the <text:span text:style-name="T1">n</text:span>e<text:span text:style-name="T1">w</text:span> certificates <text:span text:style-name="T1">in Linux</text:span></text:h>
      <text:p text:style-name="P10"/>
      <text:list text:style-name="L1">
        <text:list-item>
          <text:p text:style-name="P11"><text:span text:style-name="T11">Install </text:span><text:span text:style-name="T12">the Debian package</text:span><text:span text:style-name="T11"> fwupd </text:span><text:span text:style-name="T13">(2.0.10 or newer) </text:span><text:span text:style-name="T14">by typing in terminal:</text:span></text:p>
        </text:list-item>
      </text:list>
      <text:p text:style-name="P12"/>
      <text:p text:style-name="P13">sudo apt install fwupd</text:p>
      <text:p text:style-name="P3"/>
      <text:list text:style-name="L2">
        <text:list-item>
          <text:p text:style-name="P14"><text:span text:style-name="T12">Update the local database of firmware updates</text:span><text:span text:style-name="T11"> </text:span><text:span text:style-name="T14">by typing in terminal:</text:span></text:p>
        </text:list-item>
      </text:list>
      <text:p text:style-name="P3"/>
      <text:p text:style-name="P13">sudo fwupdmgr get-updates</text:p>
      <text:p text:style-name="P15"/>
      <text:list text:style-name="L3">
        <text:list-item>
          <text:p text:style-name="P16"><text:span text:style-name="T1">Run the</text:span><text:span text:style-name="T12"> ‘update’ </text:span><text:span text:style-name="T1">option</text:span><text:span text:style-name="T14"> in terminal:</text:span></text:p>
        </text:list-item>
      </text:list>
      <text:p text:style-name="P17"/>
      <text:p text:style-name="P13">sudo fwupdmgr update</text:p>
      <text:p text:style-name="P15"/>
      <text:list text:style-name="L4">
        <text:list-item>
          <text:p text:style-name="P18"><text:span text:style-name="T12">You will be prompted </text:span><text:span text:style-name="T15">tw</text:span><text:span text:style-name="T1">o t</text:span><text:span text:style-name="T15">i</text:span><text:span text:style-name="T1">m</text:span><text:span text:style-name="T15">e</text:span><text:span text:style-name="T1">s to Perform operation? <text:s/>[Y|n]:</text:span></text:p>
        </text:list-item>
      </text:list>
      <text:p text:style-name="P19"><text:span text:style-name="T1">E</text:span>xample is below.</text:p>
      <text:p text:style-name="P20"/>
      <text:p text:style-name="P21"><draw:frame draw:style-name="fr1" draw:name="Image1" text:anchor-type="paragraph" svg:width="3.85in" svg:height="2.1799in" draw:z-index="0"><draw:image xlink:href="Pictures/10000001000002E3000001A2D8FA9BA6.png" xlink:type="simple" xlink:show="embed" xlink:actuate="onLoad" draw:mime-type="image/png"/></draw:frame></text:p>
      <text:p text:style-name="P22"><text:span text:style-name="T1">Press</text:span><text:span text:style-name="T15"> [enter] to </text:span><text:span text:style-name="T1">answer Y to </text:span><text:span text:style-name="T15">each.</text:span></text:p>
      <text:h text:style-name="P23" text:outline-level="3"><text:span text:style-name="T7">Updating s</text:span>himx64.efi</text:h>
      <text:p text:style-name="P24"/>
      <text:p text:style-name="P25"><text:span text:style-name="T16">T</text:span>he 1.49 version <text:span text:style-name="T14">of </text:span><text:span text:style-name="T17">shim-signed.</text:span><text:span text:style-name="T18">efi</text:span><text:span text:style-name="T14"> </text:span>is in Debian S<text:span text:style-name="T7">id</text:span>. <text:span text:style-name="T7">In MX Linux 25 version 1.47 is current. </text:span><text:span text:style-name="T14">Grub is signed by Debian so no update of it is needed. </text:span>To update it <text:span text:style-name="T14">type in terminal</text:span>:</text:p>
      <text:p text:style-name="P26"/>
      <text:p text:style-name="P27">sudo apt install shim-signed</text:p>
      <text:p text:style-name="P26"/>
      <text:h text:style-name="Heading_20_2" text:outline-level="2"><text:span text:style-name="T7">Verify certificates </text:span>installation</text:h>
      <text:p text:style-name="P24"/>
      <text:p text:style-name="P28">To verify the Certificates <text:span text:style-name="T16">t</text:span><text:span text:style-name="T10">ype in terminal: </text:span><text:span text:style-name="T19">mokutil –db –short</text:span><text:span text:style-name="T10">. Example below.</text:span></text:p>
      <text:p text:style-name="P29"/>
      <text:p text:style-name="P30"><draw:frame draw:style-name="fr1" draw:name="Image3" text:anchor-type="paragraph" svg:width="3in" svg:height="1.2299in" draw:z-index="2"><draw:image xlink:href="Pictures/10000001000001C7000000BB4A27BC1A.png" xlink:type="simple" xlink:show="embed" xlink:actuate="onLoad" draw:mime-type="image/png"/></draw:frame></text:p>
      <text:p text:style-name="P31">Notice 2011 and 2023 certificates are present. This is normal.</text:p>
      <text:p text:style-name="P32"/>
      <text:h text:style-name="P33" text:outline-level="3">To verify the shimx64.efi <text:span text:style-name="T7">signing</text:span></text:h>
      <text:p text:style-name="P34">In terminal enter:</text:p>
      <text:p text:style-name="P35">sbverify --list /boot/efi/EFI/MX/shimx64.efi</text:p>
      <text:p text:style-name="P36"><text:span text:style-name="T20">Below is t</text:span>ypical output <text:span text:style-name="T21">before</text:span> shimx64.efi<text:span text:style-name="T7"> </text:span>is <text:span text:style-name="T22">signed</text:span> <text:span text:style-name="T22">with the 2023 certificates</text:span>:</text:p>
      <text:p text:style-name="Standard"><draw:frame draw:style-name="fr2" draw:name="Image2" text:anchor-type="paragraph" svg:y="0.1299in" svg:width="6in" svg:height="1.1098in" draw:z-index="1"><draw:image xlink:href="Pictures/1000000100000449000000CB195DA01E.png" xlink:type="simple" xlink:show="embed" xlink:actuate="onLoad" draw:mime-type="image/png"/></draw:frame></text:p>
      <text:p text:style-name="P37"><text:span text:style-name="T9">Source</text:span> - <text:a xlink:type="simple" xlink:href="https://learn.microsoft.com/en-us/windows-hardware/manufacture/desktop/windows-secure-boot-key-creation-and-management-guidance?view=windows-11#14-signature-databases-db-and-dbx" text:style-name="Internet_20_link" text:visited-style-name="Visited_20_Internet_20_Link">https://learn.microsoft.com/en-us/windows-hardware/manufacture/desktop/windows-secure-boot-key-creation-and-management-guidance?view=windows-11#14-signature-databases-db-and-dbx</text:a></text:p>
      <text:p text:style-name="P37"/>
      <text:p text:style-name="P38">“For devices that are intended to support Linux, other 3rd party UEFI apps, or include special hardware requiring Option ROMs, OEMs may ship devices with this alternative configuration:”</text:p>
      <text:p text:style-name="P39">After update this is what the Cerificate Store in the TPM should look like:</text:p>
      <table:table table:name="Table1" table:style-name="Table1">
        <table:table-column table:style-name="Table1.A"/>
        <table:table-column table:style-name="Table1.B"/>
        <table:table-row>
          <table:table-cell table:style-name="Table1.A1" office:value-type="string">
            <text:p text:style-name="P40">PK</text:p>
          </table:table-cell>
          <table:table-cell table:style-name="Table1.B1" office:value-type="string">
            <text:p text:style-name="P40">OEM or Microsoft PK</text:p>
          </table:table-cell>
        </table:table-row>
        <table:table-row>
          <table:table-cell table:style-name="Table1.A2" office:value-type="string">
            <text:p text:style-name="P40">KEK</text:p>
          </table:table-cell>
          <table:table-cell table:style-name="Table1.B2" office:value-type="string">
            <text:p text:style-name="P40">Microsoft Corporation KEK 2K CA 2023</text:p>
          </table:table-cell>
        </table:table-row>
        <table:table-row>
          <table:table-cell table:style-name="Table1.A2" office:value-type="string">
            <text:p text:style-name="P40">DB</text:p>
          </table:table-cell>
          <table:table-cell table:style-name="Table1.B2" office:value-type="string">
            <text:p text:style-name="P40">Windows UEFI CA 2023 <text:line-break/>Microsoft UEFI CA 2023 <text:line-break/>Microsoft Corporation UEFI CA 2011 <text:line-break/>Microsoft Option ROM UEFI CA 2023</text:p>
          </table:table-cell>
        </table:table-row>
        <table:table-row>
          <table:table-cell table:style-name="Table1.A2" office:value-type="string">
            <text:p text:style-name="P40">DBX</text:p>
          </table:table-cell>
          <table:table-cell table:style-name="Table1.B2" office:value-type="string">
            <text:p text:style-name="P40">Latest dbx package <text:soft-page-break/></text:p>
          </table:table-cell>
        </table:table-row>
      </table:table>
      <text:h text:style-name="Heading_20_3" text:outline-level="3">Windows 11</text:h>
      <text:p text:style-name="P41">The <text:span text:style-name="T10">concept of the </text:span>phrase ‘the clock is ticking’ is in play. Procrastinating past the time Microsoft does the revocations <text:span text:style-name="T23">WILL</text:span> have consequences. <text:span text:style-name="T1">A quote from Microsoft:</text:span></text:p>
      <text:p text:style-name="P42"/>
      <text:p text:style-name="P43">“<text:span text:style-name="T24">OEMs must ship the device with the Windows UEFI CA 2023-signed Windows Boot Manager, both on the device and in bootable media provided with the device. This ensures that the device uses the Windows Boot Manager that will continue to be serviced after the 2011 certificates expire.</text:span>”</text:p>
      <text:h text:style-name="Heading_20_3" text:outline-level="3">Links</text:h>
      <text:p text:style-name="P44"/>
      <text:p text:style-name="P45"><text:a xlink:type="simple" xlink:href="https://access.redhat.com/articles/7128933" text:style-name="Internet_20_link" text:visited-style-name="Visited_20_Internet_20_Link"><text:span text:style-name="T16">Secure Boot Certificate Changes in 2026</text:span></text:a> <text:span text:style-name="T16">Red Hat Customer Portal</text:span></text:p>
      <text:p text:style-name="P46"/>
      <text:p text:style-name="P45"><text:a xlink:type="simple" xlink:href="https://support.microsoft.com/en-us/topic/windows-secure-boot-certificate-expiration-and-ca-updates-7ff40d33-95dc-4c3c-8725-a9b95457578e" text:style-name="Internet_20_link" text:visited-style-name="Visited_20_Internet_20_Link"><text:span text:style-name="T16">Windows Secure Boot certificate expiration and CA updates</text:span></text:a> <text:span text:style-name="T16">Microsoft Support</text:span></text:p>
      <text:p text:style-name="P46"/>
      <text:p text:style-name="P45"><text:a xlink:type="simple" xlink:href="https://wiki.debian.org/SecureBoot/CAChanges" text:style-name="Internet_20_link" text:visited-style-name="Visited_20_Internet_20_Link"><text:span text:style-name="T16">SecureBootCAChanges</text:span></text:a><text:span text:style-name="T16"> Debian WiKi</text:span></text:p>
      <text:p text:style-name="P46"/>
      <text:p text:style-name="P46"><text:a xlink:type="simple" xlink:href="https://support.microsoft.com/en-us/topic/when-secure-boot-certificates-expire-on-windows-devices-c83b6afd-a2b6-43c6-938e-57046c80c1c2" text:style-name="Internet_20_link" text:visited-style-name="Visited_20_Internet_20_Link">When Secure Boot certificates expire on Windows devices</text:a></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pan text:style-name="T25">Please direct ALL support requests to the MX Linux Forum</text:span><text:span text:style-name="T26"> <text:s/>-- <text:s/></text:span><text:a xlink:type="simple" xlink:href="https://forum.mxlinux.org/" text:style-name="Internet_20_link" text:visited-style-name="Visited_20_Internet_20_Link"><text:span text:style-name="T26">https://forum.mxlinux.org/</text:span></text:a></text:p>
      <text:p text:style-name="P49"><text:span text:style-name="T9">Created by</text:span> FullScale4Me on <text:span text:style-name="T14">June </text:span><text:span text:style-name="T13">4</text:span>, 202<text:span text:style-name="T14">6</text:span><text:tab/><text:tab/><text:tab/><text:tab/> <text:s/><text:span text:style-name="T9">Last updated</text:span> <text:span text:style-name="T14">June </text:span><text:span text:style-name="T7">22</text:span><text:span text:style-name="T27">,</text:span> 202<text:span text:style-name="T28">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b9aac"/>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5T00:40:26.072217227</meta:creation-date>
    <meta:generator>LibreOffice/26.2.4.2$Linux_X86_64 LibreOffice_project/0229ac93fcf0d7cbc6376066c6f35021cef002dc</meta:generator>
    <dc:date>2026-06-22T19:39:11.693079352</dc:date>
    <dc:creator>Michael O'Toole</dc:creator>
    <meta:editing-duration>PT1H52M37S</meta:editing-duration>
    <meta:editing-cycles>26</meta:editing-cycles>
    <meta:print-date>2026-06-22T19:33:34.726504594</meta:print-date>
    <meta:printed-by>Michael O'Toole</meta:printed-by>
    <dc:title>2023 Certificates: Install How-To</dc:title>
    <meta:document-statistic meta:table-count="1" meta:image-count="3" meta:object-count="0" meta:page-count="3" meta:paragraph-count="49" meta:word-count="543" meta:character-count="3672" meta:non-whitespace-character-count="3171"/>
  </office:meta>
</office:document-meta>
</file>